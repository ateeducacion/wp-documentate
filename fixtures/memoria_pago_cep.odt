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0FF3B59F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002cm" fo:margin-left="0.176cm" table:align="left"/>
    </style:style>
    <style:style style:name="Table1.A" style:family="table-column">
      <style:table-column-properties style:column-width="4.501cm"/>
    </style:style>
    <style:style style:name="Table1.B" style:family="table-column">
      <style:table-column-properties style:column-width="4.001cm"/>
    </style:style>
    <style:style style:name="Table1.C" style:family="table-column">
      <style:table-column-properties style:column-width="3.75cm"/>
    </style:style>
    <style:style style:name="Table1.1" style:family="table-row">
      <style:table-row-properties style:min-row-height="0.741cm" style:use-optimal-row-height="false"/>
    </style:style>
    <style:style style:name="Table1.A1" style:family="table-cell">
      <style:table-cell-properties fo:padding="0.176cm" fo:border="0.75pt solid #000000" style:writing-mode="lr-tb"/>
    </style:style>
    <style:style style:name="P1" style:family="paragraph" style:parent-style-name="normal1" style:master-page-name="MP0">
      <style:paragraph-properties fo:margin-top="1.124cm" fo:margin-bottom="0cm" style:contextual-spacing="false" fo:line-height="95%" fo:orphans="0" fo:widows="0" style:page-number="1" fo:break-before="page"/>
      <style:text-properties officeooo:paragraph-rsid="0009414d"/>
    </style:style>
    <style:style style:name="P2" style:family="paragraph" style:parent-style-name="normal1">
      <style:paragraph-properties fo:line-height="90%" fo:text-align="justify" style:justify-single-word="false" fo:orphans="0" fo:widows="0"/>
      <style:text-properties style:font-name="Times New Roman" fo:font-weight="bold" fo:background-color="#ff9900" style:font-name-asian="Times New Roman" style:font-weight-asian="bold" style:font-name-complex="Times New Roman" style:font-weight-complex="bold"/>
    </style:style>
    <style:style style:name="P3" style:family="paragraph" style:parent-style-name="normal1">
      <style:paragraph-properties fo:line-height="90%" fo:text-align="justify" style:justify-single-word="false" fo:orphans="0" fo:widows="0"/>
      <style:text-properties style:font-name="Times New Roman" style:font-name-asian="Times New Roman" style:font-name-complex="Times New Roman"/>
    </style:style>
    <style:style style:name="P4" style:family="paragraph" style:parent-style-name="normal1">
      <style:paragraph-properties fo:line-height="90%" fo:text-align="justify" style:justify-single-word="false" fo:orphans="0" fo:widows="0"/>
      <style:text-properties style:font-name="Times New Roman" fo:font-size="8pt" style:font-name-asian="Times New Roman" style:font-size-asian="8pt" style:font-name-complex="Times New Roman" style:font-size-complex="8pt"/>
    </style:style>
    <style:style style:name="P5" style:family="paragraph" style:parent-style-name="normal1">
      <style:paragraph-properties fo:line-height="90%" fo:text-align="justify" style:justify-single-word="false" fo:orphans="0" fo:widows="0"/>
      <style:text-properties fo:color="#ffff00" loext:opacity="100%" style:font-name="Times New Roman" fo:font-weight="bold" fo:background-color="#1155cc" style:font-name-asian="Times New Roman" style:font-weight-asian="bold" style:font-name-complex="Times New Roman" style:font-weight-complex="bold"/>
    </style:style>
    <style:style style:name="P6" style:family="paragraph" style:parent-style-name="normal1">
      <style:paragraph-properties fo:line-height="90%" fo:orphans="0" fo:widows="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7" style:family="paragraph" style:parent-style-name="normal1">
      <style:paragraph-properties fo:line-height="100%" fo:text-align="center" style:justify-single-word="false" fo:orphans="0" fo:widows="0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8" style:family="paragraph" style:parent-style-name="normal1">
      <style:paragraph-properties fo:line-height="90%" fo:text-align="center" style:justify-single-word="false" fo:orphans="0" fo:widows="0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9" style:family="paragraph" style:parent-style-name="normal1">
      <style:paragraph-properties fo:line-height="100%"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normal1">
      <style:paragraph-properties fo:line-height="90%"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" style:family="paragraph" style:parent-style-name="normal1">
      <style:paragraph-properties fo:line-height="90%" fo:orphans="0" fo:widows="0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2" style:family="paragraph" style:parent-style-name="normal1">
      <style:paragraph-properties fo:line-height="90%" fo:orphans="0" fo:widows="0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officeooo:rsid="000d23da"/>
    </style:style>
    <style:style style:name="T3" style:family="text">
      <style:text-properties officeooo:rsid="000df5e1"/>
    </style:style>
    <style:style style:name="T4" style:family="text">
      <style:text-properties officeooo:rsid="001104f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paragraph" svg:x="0.265cm" svg:y="0.002cm" svg:width="9.349cm" style:rel-width="scale" svg:height="2.17cm" style:rel-height="scale" draw:z-index="0"><draw:image xlink:href="Pictures/100000010000044D000000F60FF3B59F.png" xlink:type="simple" xlink:show="embed" xlink:actuate="onLoad" draw:mime-type="image/png"/></draw:frame><text:span text:style-name="Fuente_20_de_20_párrafo_20_predeter."><text:span text:style-name="T1"><text:line-break/>MEMORIA JUSTIFICATIVA DE LA DIRECCIÓN GENERAL DE ORDENACIÓN DE LAS ENSEÑANZAS, INCLUSIÓN E INNOVACIÓN PARA EL [cep;type='text';title='Centro del Profesorado (CEP)';placeholder='CEP de Santa Cruz de Tenerife';description='Centro del Profesorado responsable del pago';ope=utf8,upper;length='150';required='true'], DESTINADA A ORDENAR EL PAGO [concepto;type='text';title='Concepto del pago';placeholder='de varias facturas para sufragar los gastos derivados de la asistencia a...';description='Concepto general del pago que aparecerá en el encabezado del documento';ope=utf8,upper;length='200';required='true']</text:span></text:span></text:p>
      <text:p text:style-name="P2"/>
      <text:p text:style-name="P3">La Dirección General de Ordenación de las Enseñanzas, Inclusión e Innovación, de la Consejería de Educación, Formación Profesional, Actividad Física y Deportes, viene impulsando procesos de innovación del sistema educativo mediante la implementación de acciones, programas y proyectos que fomenten la calidad de la enseñanza y la mejora de los aprendizajes.</text:p>
      <text:p text:style-name="P4"/>
      <text:p text:style-name="P2"/>
      <text:p text:style-name="P3">[parrafo_jornadas;type='<text:span text:style-name="T2">textarea</text:span>';title='Descripción de la actividad';description='Texto justificativo de la actividad o jornadas';placeholder='Describa brevemente la actividad, su objetivo pedagógico y el contexto';required='true']</text:p>
      <text:p text:style-name="P4"/>
      <text:p text:style-name="P3">Según consta en la resolución nº [resolucion_num;type='text';title='Número de resolución';placeholder='1539/2023';description='Número de la resolución administrativa';length='20';required='true'] del [resolucion_fecha;type='<text:span text:style-name="T3">text</text:span>';title='Fecha de la resolución <text:span text:style-name="T3">en formato DD/MM/AAA</text:span>';description='Fecha en la que se firma la resolución';required='true'], por la que se asigna una dotación económica extraordinaria, y se autoriza el correspondiente libramiento extraordinario de fondos, destinados a sufragar los gastos derivados del desarrollo e implementación de proyectos, programas y planes que se impulsen desde la Dirección General de Ordenación de las Enseñanzas, Inclusión e Innovación durante el ejercicio [<text:span text:style-name="T4">year</text:span>;type='number';title='Año';placeholder='2025';minvalue='2000';maxvalue='2050';required='true'], se considera justificado este gasto y, por lo tanto, se informa favorablemente la realización del pago de las facturas que se relaciona a continuación:</text:p>
      <text:p text:style-name="P5"/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7">[persona;type='select';title='Tipo de entidad';values='COORDINADOR/A|PROVEEDOR/A|EMPRESA';description='Tipo de persona o entidad que emite la factura';required='true']</text:p>
          </table:table-cell>
          <table:table-cell table:style-name="Table1.A1" office:value-type="string">
            <text:p text:style-name="P7">CONCEPTO</text:p>
          </table:table-cell>
          <table:table-cell table:style-name="Table1.A1" office:value-type="string">
            <text:p text:style-name="P8">NºFACTURA</text:p>
          </table:table-cell>
          <table:table-cell table:style-name="Table1.A1" office:value-type="string">
            <text:p text:style-name="P8">IMPORTE</text:p>
          </table:table-cell>
        </table:table-row>
        <table:table-row table:style-name="Table1.1">
          <table:table-cell table:style-name="Table1.A1" office:value-type="string">
            <text:p text:style-name="P9">[items.nombre;block=tbs:row;type='text';title='Nombre o entidad';placeholder='Ej. Ivonne Montesdeoca Morales / Empresa S.L.';length='150']</text:p>
          </table:table-cell>
          <table:table-cell table:style-name="Table1.A1" office:value-type="string">
            <text:p text:style-name="P9">[items.concepto;type='text';title='Concepto de la factura';placeholder='Ej. Inscripción en jornadas';length='200']</text:p>
          </table:table-cell>
          <table:table-cell table:style-name="Table1.A1" office:value-type="string">
            <text:p text:style-name="P10">[items.num_factura;type='text';title='Número de factura';placeholder='Ej. F-234/2025';length='50']</text:p>
          </table:table-cell>
          <table:table-cell table:style-name="Table1.A1" office:value-type="string">
            <text:p text:style-name="P10">[items.importe;type='number';title='Importe (€)';placeholder='0.00';minvalue='0';step='0.01'] €</text:p>
          </table:table-cell>
        </table:table-row>
      </table:table>
      <text:p text:style-name="P11"/>
      <text:p text:style-name="P11"/>
      <text:p text:style-name="P12"><text:span text:style-name="Fuente_20_de_20_párrafo_20_predeter."><text:span text:style-name="T1">EL DIRECTOR GENERAL DE ORDENACIÓN DE LAS ENSEÑANZAS, INCLUSIÓN E INNOV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none" svg:stroke-color="#3465a4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1" style:next-style-name="normal1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1" style:next-style-name="normal1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1" style:next-style-name="normal1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1" style:next-style-name="normal1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1" style:next-style-name="normal1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1" style:next-style-name="normal1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1" style:next-style-name="Texto_20_independiente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margin-top="0cm" fo:margin-bottom="0.247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o_20_independient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Índice" style:family="paragraph" style:parent-style-name="Normal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1" style:next-style-name="normal1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Comentario" style:family="paragraph" style:parent-style-name="Normal">
      <style:paragraph-properties fo:margin-left="0.101cm" fo:margin-right="0.101cm" fo:margin-top="0.099cm" fo:margin-bottom="0cm" style:contextual-spacing="false" fo:line-height="100%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line-height="100%"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exto_20_comentario_20_Car" style:display-name="Texto comentario Car" style:family="text" style:parent-style-name="Fuente_20_de_20_párrafo_20_predeter.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MacOSX_AARCH64 LibreOffice_project/1f77d10d6938fd34972958f64b2bcfa54f8b1ba5</meta:generator>
    <dc:title/>
    <dc:description/>
    <dc:subject/>
    <meta:initial-creator>Ernesto Serrano</meta:initial-creator>
    <meta:creation-date>2026-03-02T21:44:00Z</meta:creation-date>
    <dc:date>2026-04-23T13:01:40.656731000</dc:date>
    <meta:editing-cycles>13</meta:editing-cycles>
    <meta:editing-duration>PT34M11S</meta:editing-duration>
    <meta:document-statistic meta:table-count="1" meta:image-count="1" meta:object-count="0" meta:page-count="1" meta:paragraph-count="13" meta:word-count="281" meta:character-count="2872" meta:non-whitespace-character-count="2603"/>
    <meta:template xlink:type="simple" xlink:actuate="onRequest" xlink:title="" xlink:href="Normal.dotm"/>
  </office:meta>
</office:document-meta>
</file>