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0FF3B59F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b323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firmante;type='text';title='Persona que certifica';placeholder='Ej. <text:span text:style-name="T1">Ivonne Piñero Montesdeoca</text:span>';description='Nombre y apellidos de quien expide la certificación';ope=utf8,upper;length='120';required='true'], [cargo;type='select';title='Cargo de quien certifica';values='RESPONSABLE DEL SERVICIO DE ORDENACIÓN DE LAS ENSEÑANZAS Y EDUCACIÓN DE PERSONAS ADULTAS|DIRECTOR GENERAL DE ORDENACIÓN DE LAS ENSEÑANZAS, INCLUSIÓN E INNOVACIÓN';description='Seleccione el cargo de la persona que certifica';required='true'],</text:p>
      <text:p text:style-name="Standard"/>
      <text:p text:style-name="P2"><text:span text:style-name="T2">HACE CONSTAR</text:span> que según los datos que obran en esta Dirección General de Ordenación de las Enseñanzas, Inclusión e Innovación, [tratamiento;type='select';title='Tratamiento';values='Doña|Don';description='Tratamiento de cortesía de la persona interesada';required='true'] <text:span text:style-name="T2">[nombre_completo;type='text';title='Nombre completo';placeholder='Ej. Beatriz Oliver Taño';description='Nombre y apellidos de la persona interesada';ope=utf8,upper;length='120';required='true']</text:span> con DNI <text:span text:style-name="T2">n.º [dni;type='text';title='DNI';placeholder='12345678A';description='Documento Nacional de Identidad sin espacios';pattern='^[0-9]{8}[A-Za-z]$';patternmsg='Formato válido: 12345678A';length='9';required='true'],</text:span> ha participado en:</text:p>
      <text:p text:style-name="Standard"/>
      <text:p text:style-name="P2">[participaciones;type='html';title='Participaciones';description='Detalle las actividades en las que ha participado. Se recomienda usar una lista con viñetas';required='true']</text:p>
      <text:p text:style-name="Standard"/>
      <text:p text:style-name="Standard"/>
      <text:p text:style-name="P3">Y para que conste, firmo la presente.</text:p>
      <text:p text:style-name="Standard"/>
      <text:p text:style-name="P3">En [lugar_firma;type='select';title='Lugar de la firma';values='Santa Cruz de Tenerife|Las Palmas de Gran Canaria';description='Sede desde la que se firma el documento';required='true'], a la fecha de la firma electrónic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pitch="variable" fo:font-size="11pt" fo:language="es" fo:country="ES" style:letter-kerning="true" style:font-name-asian="SimSun1" style:font-family-asian="SimSun, 宋体" style:font-pitch-asian="variable" style:font-size-asian="11pt" style:language-asian="zh" style:country-asian="CN" style:font-name-complex="Mangal1" style:font-family-complex="Mangal, 'Courier New'" style:font-family-generic-complex="roman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de_20_párrafo_20_predeterminado" style:display-name="Estilo de párrafo predeterminado" style:family="paragraph" style:class="text"/>
    <style:style style:name="Cuerpo_20_de_20_texto" style:display-name="Cuerpo de texto" style:family="paragraph" style:parent-style-name="Estilo_20_de_20_párrafo_20_predeterminado" style:class="text">
      <style:paragraph-properties fo:margin-top="0cm" fo:margin-bottom="0.247cm" style:contextual-spacing="false" fo:line-height="115%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Título_20_de_20_la_20_tabla" style:display-name="Título de la tabla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Contenido_20_de_20_la_20_tabla" style:display-name="Contenido de la tabla" style:family="paragraph"/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aracteres_20_de_20_nota_20_al_20_pie" style:display-name="Caracteres de nota al pie" style:family="text"/>
    <style:style style:name="Caracteres_20_de_20_nota_20_final" style:display-name="Caracteres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0" number:min-decimal-places="0" number:min-integer-digits="1"/>
      <number:text> %</number:text>
    </number:percentage-style>
    <number:currency-style style:name="N13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6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6P0"/>
    </number:currency-style>
    <number:number-style style:name="N139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3">
      <number:text> </number:text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number:min-decimal-places="2" number:min-integer-digits="1" number:grouping="true"/>
      <number:text>€</number:text>
    </number:number-style>
    <number:number-style style:name="N145">
      <number:number number:decimal-places="4" number:min-decimal-places="4" number:min-integer-digits="1"/>
    </number:number-style>
    <number:percentage-style style:name="N146">
      <number:number number:decimal-places="0" number:min-decimal-places="0" number:min-integer-digits="1"/>
      <number:text>%</number:text>
    </number:percentag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">
      <number:number number:decimal-places="2" number:min-decimal-places="2" number:min-integer-digits="1" number:grouping="true"/>
      <number:text>  </number:text>
    </number:number-style>
    <number:currency-style style:name="N15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0P0"/>
    </number:currency-style>
    <number:number-style style:name="N151">
      <number:number number:decimal-places="3" number:min-decimal-places="3" number:min-integer-digits="1"/>
    </number:number-style>
    <number:number-style style:name="N152">
      <number:number number:decimal-places="3" number:min-decimal-places="3" number:min-integer-digits="1" number:grouping="true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4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currency-style style:name="N155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5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currency-style style:name="N10115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5P0"/>
    </number:currency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text-properties officeooo:paragraph-rsid="00a22821"/>
    </style:style>
    <style:style style:name="MP3" style:family="paragraph" style:parent-style-name="Footer">
      <style:paragraph-properties fo:text-align="start" style:justify-single-word="false"/>
      <style:text-properties style:font-name="Univers 45 Light" style:font-name-complex="Univers 45 Light" style:font-size-complex="10pt"/>
    </style:style>
    <style:style style:name="MP4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5" style:family="paragraph"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" text:anchor-type="as-char" svg:width="0.794cm" svg:height="1.501cm"><draw:image xlink:href="Pictures/1000000000000045000000856F587C46.jpg" xlink:type="simple" xlink:show="embed" xlink:actuate="onLoad" draw:mime-type="image/jpeg"/></draw:frame></text:p>
      </style:header>
      <style:footer>
        <text:p text:style-name="Standard"/>
        <text:p text:style-name="MP2"/>
      </style:footer>
      <style:footer-left>
        <text:p text:style-name="MP3"><text:bookmark-start text:name="PageNumWizard_FOOTER_Estilo de página predeterminado3"/><text:page-number text:select-page="current">0</text:page-number><text:bookmark-end text:name="PageNumWizard_FOOTER_Estilo de página predeterminado3"/></text:p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4"><draw:frame text:anchor-type="char" draw:z-index="0" draw:name="Forma1" draw:style-name="Mgr1" draw:text-style-name="MP6" svg:width="29.848cm" svg:height="1.23cm" draw:transform="rotate (1.5707963267949) translate (-2.00025cm 27.5955138888889cm)"><draw:text-box><text:p text:style-name="MP5"><text:span text:style-name="MT1">Avda. Buenos Aires 3-5, Edf. Tres de Mayo Planta 4ª <text:s/>| CP 38071 Santa Cruz de Tenerife <text:s/>| <text:s/>Tfno: 922 42 35 00 <text:s text:c="3"/>| Fax: 922 42 38 06</text:span></text:p><text:p text:style-name="MP5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" text:anchor-type="char" svg:x="0.125cm" svg:y="-0.062cm" svg:width="9.349cm" svg:height="2.17cm" draw:z-index="1"><draw:image xlink:href="Pictures/100000010000044D000000F60FF3B59F.png" xlink:type="simple" xlink:show="embed" xlink:actuate="onLoad" draw:mime-type="image/png"/></draw:frame></text:p>
      </style:header>
      <style:footer>
        <text:p text:style-name="MP7"><text:bookmark-start text:name="PageNumWizard_FOOTER_Primera página1"/><text:page-number text:select-page="current">1</text:page-number><text:bookmark-end text:name="PageNumWizard_FOOTER_Primera página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31</meta:editing-cycles>
    <meta:editing-duration>PT6H54M9S</meta:editing-duration>
    <meta:generator>LibreOffice/26.2.2.2$MacOSX_AARCH64 LibreOffice_project/1f77d10d6938fd34972958f64b2bcfa54f8b1ba5</meta:generator>
    <dc:date>2026-06-11T10:13:46.176508000</dc:date>
    <meta:print-date>2025-04-07T14:48:24.399000000</meta:print-date>
    <meta:document-statistic meta:table-count="0" meta:image-count="2" meta:object-count="0" meta:page-count="1" meta:paragraph-count="9" meta:word-count="147" meta:character-count="1654" meta:non-whitespace-character-count="1511"/>
    <meta:user-defined meta:name="AppVersion">16.0000</meta:user-defined>
  </office:meta>
</office:document-meta>
</file>